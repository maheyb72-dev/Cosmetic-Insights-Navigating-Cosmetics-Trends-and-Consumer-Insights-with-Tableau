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8C0000035243A75809.png" manifest:media-type="image/png"/>
  <manifest:file-entry manifest:full-path="Pictures/1000000100000472000002F8F7B8D33C.png" manifest:media-type="image/png"/>
  <manifest:file-entry manifest:full-path="Pictures/100000010000029E00000322AA4D0E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BM Plex Sans" svg:font-family="'IBM Plex Sans'" style:font-family-generic="roman" style:font-pitch="variable"/>
    <style:font-face style:name="IBM Plex Sans1" svg:font-family="'IBM Plex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page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text-properties officeooo:rsid="001761c7" officeooo:paragraph-rsid="001761c7"/>
    </style:style>
    <style:style style:name="P5" style:family="paragraph" style:parent-style-name="normal">
      <style:text-properties officeooo:rsid="0013559a" officeooo:paragraph-rsid="0013559a"/>
    </style:style>
    <style:style style:name="P6" style:family="paragraph" style:parent-style-name="normal">
      <style:text-properties fo:font-size="12pt" fo:font-weight="bold" style:font-size-asian="12pt" style:font-weight-asian="bold" style:font-size-complex="12pt"/>
    </style:style>
    <style:style style:name="P7" style:family="paragraph" style:parent-style-name="normal">
      <loext:graphic-properties draw:fill="solid" draw:fill-color="#ffffff"/>
      <style:paragraph-properties fo:margin-left="0cm" fo:margin-right="0cm" fo:margin-top="0cm" fo:margin-bottom="0.282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style:shadow="none" fo:keep-with-next="auto" style:join-border="false" loext:word-spacing-minimum="75%" loext:word-spacing-maximum="133%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4b94d" style:font-size-asian="14pt" style:font-weight-asian="bold" style:font-size-complex="14pt"/>
    </style:style>
    <style:style style:name="T3" style:family="text">
      <style:text-properties officeooo:rsid="0014b94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4b94d" style:font-size-asian="12pt" style:font-weight-asian="bold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4b94d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8" style:family="text">
      <style:text-properties fo:color="#0563c1" loext:opacity="100%" style:text-underline-style="solid" style:text-underline-width="auto" style:text-und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1155cc" loext:opacity="100%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deation Phase</text:span><text:span text:style-name="T1"/></text:p>
      <text:p text:style-name="P2" loext:marker-style-name="T1"><text:span text:style-name="T1">Brainstorm &amp; Idea Prioriti</text:span><text:span text:style-name="T2">s</text:span><text:span text:style-name="T1">ation Template</text:span></text:p>
      <text:p text:style-name="P3" loext:marker-style-name="T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normal">Date</text:p>
          </table:table-cell>
          <table:table-cell table:style-name="Table1.A1" office:value-type="string">
            <text:p text:style-name="P4">01-July-2026</text:p>
          </table:table-cell>
        </table:table-row>
        <table:table-row table:style-name="Table1.1">
          <table:table-cell table:style-name="Table1.A1" office:value-type="string">
            <text:p text:style-name="normal">Team ID</text:p>
          </table:table-cell>
          <table:table-cell table:style-name="Table1.A1" office:value-type="string">
            <text:p text:style-name="normal"/>
          </table:table-cell>
        </table:table-row>
        <table:table-row table:style-name="Table1.1">
          <table:table-cell table:style-name="Table1.A1" office:value-type="string">
            <text:p text:style-name="normal">Project Name</text:p>
          </table:table-cell>
          <table:table-cell table:style-name="Table1.A1" office:value-type="string">
            <text:p text:style-name="P5">Cosmetic Insights: Navigating Cosmetics Trends and Consumer In<text:span text:style-name="T3">si</text:span>ghts with Tableau </text:p>
          </table:table-cell>
        </table:table-row>
        <table:table-row table:style-name="Table1.1">
          <table:table-cell table:style-name="Table1.A1" office:value-type="string">
            <text:p text:style-name="normal">Maximum Marks</text:p>
          </table:table-cell>
          <table:table-cell table:style-name="Table1.A1" office:value-type="string">
            <text:p text:style-name="normal">4 Marks</text:p>
          </table:table-cell>
        </table:table-row>
      </table:table>
      <text:p text:style-name="P6" loext:marker-style-name="T4"/>
      <text:p text:style-name="normal" loext:marker-style-name="T4"><text:span text:style-name="T4">Brainstorm &amp; Idea Prioriti</text:span><text:span text:style-name="T5">s</text:span><text:span text:style-name="T4">ation Template:</text:span></text:p>
      <text:p text:style-name="P7" loext:marker-style-name="T6"><text:span text:style-name="T6">Brainstorming provides a free and open environment that encourages everyone within a team to participate in the creative thinking process that leads to problem solving. Prioriti</text:span><text:span text:style-name="T7">s</text:span><text:span text:style-name="T6">ing volume over value, out-of-the-box ideas are welcome and built upon, and all participants are encouraged to collaborate, helping each other develop a rich amount of creative solutions.</text:span></text:p>
      <text:p text:style-name="P7" loext:marker-style-name="T6"><text:span text:style-name="T6">Use this template in your own brainstorming sessions so your team can unleash their imagination and start shaping concepts even if you're not sitting in the same room.</text:span><text:span text:style-name="T6"/></text:p>
      <text:p text:style-name="normal" loext:marker-style-name="T8"><text:span text:style-name="T9">Reference: </text:span><text:a xlink:type="simple" xlink:href="https://www.mural.co/templates/brainstorm-and-idea-prioritization" text:style-name="ListLabel_20_1" text:visited-style-name="ListLabel_20_1"><text:span text:style-name="T10">https://www.mural.co/templates/brainstorm-and-idea-prioritization</text:span></text:a></text:p>
      <text:p text:style-name="normal" loext:marker-style-name="T4"><text:span text:style-name="T4">Step-1: Team Gathering, Collaboration and Select the Problem Statement</text:span><text:span text:style-name="T4"/></text:p>
      <text:p text:style-name="normal"><draw:frame draw:style-name="fr1" draw:name="image3.png" text:anchor-type="as-char" svg:width="15.921cm" svg:height="11.626cm" draw:z-index="0"><draw:image xlink:href="Pictures/100000010000048C0000035243A75809.png" xlink:type="simple" xlink:show="embed" xlink:actuate="onLoad" draw:mime-type="image/png"/><svg:desc>Graphical user interface, application

Description automatically generated</svg:desc></draw:frame></text:p>
      <text:p text:style-name="normal"/>
      <text:p text:style-name="normal"><text:soft-page-break/></text:p>
      <text:p text:style-name="normal"/>
      <text:p text:style-name="normal" loext:marker-style-name="T11"><text:span text:style-name="T11">Step-2: Brainstorm, Idea Listing and Grouping</text:span><text:span text:style-name="T11"/></text:p>
      <text:p text:style-name="normal"><draw:frame draw:style-name="fr1" draw:name="image2.png" text:anchor-type="as-char" svg:width="15.921cm" svg:height="10.633cm" draw:z-index="1"><draw:image xlink:href="Pictures/1000000100000472000002F8F7B8D33C.png" xlink:type="simple" xlink:show="embed" xlink:actuate="onLoad" draw:mime-type="image/png"/><svg:desc>Graphical user interface, treemap chart

Description automatically generated</svg:desc></draw:frame></text:p>
      <text:p text:style-name="normal"/>
      <text:p text:style-name="normal" loext:marker-style-name="T11"><text:span text:style-name="T11">Step-3: Idea Prioritization</text:span><text:span text:style-name="T11"/></text:p>
      <text:p text:style-name="normal" loext:marker-style-name="T9"><text:soft-page-break/><draw:frame draw:style-name="fr1" draw:name="image1.png" text:anchor-type="as-char" svg:width="10.031cm" svg:height="12.009cm" draw:z-index="2"><draw:image xlink:href="Pictures/100000010000029E00000322AA4D0ED7.png" xlink:type="simple" xlink:show="embed" xlink:actuate="onLoad" draw:mime-type="image/png"/><svg:desc>Diagram

Description automatically generated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BM Plex Sans" svg:font-family="'IBM Plex Sans'" style:font-family-generic="roman" style:font-pitch="variable"/>
    <style:font-face style:name="IBM Plex Sans1" svg:font-family="'IBM Plex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Default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fo:color="#000000" loext:opacity="100%" style:font-name="IBM Plex Sans" fo:font-family="'IBM Plex Sans'" style:font-family-generic="roman" style:font-pitch="variable" fo:font-size="12pt" style:font-size-asian="12pt" style:font-name-complex="IBM Plex Sans1" style:font-family-complex="'IBM Plex Sans'" style:font-family-generic-complex="system" style:font-pitch-complex="variable" style:font-size-complex="12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54cm" fo:margin-right="2.54cm" style:writing-mode="lr-tb" style:layout-grid-color="#c0c0c0" style:layout-grid-lines="2565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18T16:51:00</meta:creation-date>
    <meta:initial-creator>Amarender Katkam</meta:initial-creator>
    <dc:date>2026-07-02T20:18:55.043666600</dc:date>
    <meta:editing-duration>PT14M15S</meta:editing-duration>
    <meta:editing-cycles>4</meta:editing-cycles>
    <meta:generator>LibreOffice/26.2.4.2$Windows_X86_64 LibreOffice_project/0229ac93fcf0d7cbc6376066c6f35021cef002dc</meta:generator>
    <meta:print-date>2026-07-02T20:18:11.230320000</meta:print-date>
    <meta:printed-by>PDF files</meta:printed-by>
    <meta:document-statistic meta:table-count="1" meta:image-count="3" meta:object-count="0" meta:page-count="3" meta:paragraph-count="19" meta:word-count="133" meta:character-count="984" meta:non-whitespace-character-count="866"/>
  </office:meta>
</office:document-meta>
</file>